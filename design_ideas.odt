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Tabelle1" style:family="table">
      <style:table-properties style:width="13.136cm" table:align="left"/>
    </style:style>
    <style:style style:name="Tabelle1.A" style:family="table-column">
      <style:table-column-properties style:column-width="7.168cm"/>
    </style:style>
    <style:style style:name="Tabelle1.B" style:family="table-column">
      <style:table-column-properties style:column-width="4.24cm"/>
    </style:style>
    <style:style style:name="Tabelle1.C" style:family="table-column">
      <style:table-column-properties style:column-width="1.727cm"/>
    </style:style>
    <style:style style:name="Tabelle1.A1" style:family="table-cell">
      <style:table-cell-properties style:vertical-align="middle" fo:padding="0cm" fo:border="none"/>
    </style:style>
    <style:style style:name="Tabelle1.A2" style:family="table-cell">
      <style:table-cell-properties style:vertical-align="middle" fo:padding-left="0cm" fo:padding-right="0.238cm" fo:padding-top="0cm" fo:padding-bottom="0.132cm" fo:border-left="none" fo:border-right="0.05pt solid #000000" fo:border-top="none" fo:border-bottom="0.05pt solid #000000"/>
    </style:style>
    <style:style style:name="Tabelle1.C2" style:family="table-cell">
      <style:table-cell-properties style:vertical-align="middle" fo:padding-left="0cm" fo:padding-right="0cm" fo:padding-top="0cm" fo:padding-bottom="0.132cm" fo:border-left="none" fo:border-right="none" fo:border-top="none" fo:border-bottom="0.05pt solid #000000"/>
    </style:style>
    <style:style style:name="Tabelle1.A5" style:family="table-cell">
      <style:table-cell-properties style:vertical-align="middle" fo:padding-left="0cm" fo:padding-right="0.238cm" fo:padding-top="0cm" fo:padding-bottom="0cm" fo:border-left="none" fo:border-right="0.05pt solid #000000" fo:border-top="none" fo:border-bottom="none"/>
    </style:style>
    <style:style style:name="Tabelle2" style:family="table">
      <style:table-properties style:width="16.485cm" table:align="left"/>
    </style:style>
    <style:style style:name="Tabelle2.A" style:family="table-column">
      <style:table-column-properties style:column-width="1.591cm"/>
    </style:style>
    <style:style style:name="Tabelle2.B" style:family="table-column">
      <style:table-column-properties style:column-width="6.041cm"/>
    </style:style>
    <style:style style:name="Tabelle2.C" style:family="table-column">
      <style:table-column-properties style:column-width="8.853cm"/>
    </style:style>
    <style:style style:name="Tabelle2.A1" style:family="table-cell">
      <style:table-cell-properties style:vertical-align="middle" fo:padding="0cm" fo:border="none"/>
    </style:style>
    <style:style style:name="Tabelle2.A2" style:family="table-cell">
      <style:table-cell-properties style:vertical-align="middle" fo:padding-left="0cm" fo:padding-right="0.238cm" fo:padding-top="0cm" fo:padding-bottom="0.132cm" fo:border-left="none" fo:border-right="0.05pt solid #000000" fo:border-top="none" fo:border-bottom="0.05pt solid #000000"/>
    </style:style>
    <style:style style:name="Tabelle2.C2" style:family="table-cell">
      <style:table-cell-properties style:vertical-align="middle" fo:padding-left="0cm" fo:padding-right="0cm" fo:padding-top="0cm" fo:padding-bottom="0.132cm" fo:border-left="none" fo:border-right="none" fo:border-top="none" fo:border-bottom="0.05pt solid #000000"/>
    </style:style>
    <style:style style:name="Tabelle2.A8" style:family="table-cell">
      <style:table-cell-properties style:vertical-align="middle" fo:padding-left="0cm" fo:padding-right="0.238cm" fo:padding-top="0cm" fo:padding-bottom="0cm" fo:border-left="none" fo:border-right="0.05pt solid #000000" fo:border-top="none" fo:border-bottom="none"/>
    </style:style>
    <style:style style:name="Tabelle3" style:family="table">
      <style:table-properties style:width="13.391cm" table:align="left"/>
    </style:style>
    <style:style style:name="Tabelle3.A" style:family="table-column">
      <style:table-column-properties style:column-width="7.142cm"/>
    </style:style>
    <style:style style:name="Tabelle3.B" style:family="table-column">
      <style:table-column-properties style:column-width="6.249cm"/>
    </style:style>
    <style:style style:name="Tabelle3.A1" style:family="table-cell">
      <style:table-cell-properties style:vertical-align="middle" fo:padding="0cm" fo:border="none"/>
    </style:style>
    <style:style style:name="Tabelle3.A2" style:family="table-cell">
      <style:table-cell-properties style:vertical-align="middle" fo:padding-left="0cm" fo:padding-right="0.238cm" fo:padding-top="0cm" fo:padding-bottom="0.132cm" fo:border-left="none" fo:border-right="0.05pt solid #000000" fo:border-top="none" fo:border-bottom="0.05pt solid #000000"/>
    </style:style>
    <style:style style:name="Tabelle3.B2" style:family="table-cell">
      <style:table-cell-properties style:vertical-align="middle" fo:padding-left="0cm" fo:padding-right="0cm" fo:padding-top="0cm" fo:padding-bottom="0.132cm" fo:border-left="none" fo:border-right="none" fo:border-top="none" fo:border-bottom="0.05pt solid #000000"/>
    </style:style>
    <style:style style:name="Tabelle3.A8" style:family="table-cell">
      <style:table-cell-properties style:vertical-align="middle" fo:padding-left="0cm" fo:padding-right="0.238cm" fo:padding-top="0cm" fo:padding-bottom="0cm" fo:border-left="none" fo:border-right="0.05pt solid #000000" fo:border-top="none" fo:border-bottom="none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bfbfbf" loext:opacity="100%" style:font-name="system-ui" fo:font-size="9.75pt" fo:letter-spacing="normal" fo:font-style="normal" fo:font-weight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color="#bfbfbf" loext:opacity="100%" style:font-name="system-ui" fo:font-size="9.75pt" fo:font-weight="normal" officeooo:rsid="001dd04e" officeooo:paragraph-rsid="001dd04e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50%" fo:orphans="1" fo:text-indent="0cm" style:auto-text-indent="false"/>
      <style:text-properties fo:color="#bfbfbf" loext:opacity="100%" style:font-name="system-ui" fo:font-size="9.75pt" officeooo:rsid="001dd04e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40%" fo:orphans="1" fo:text-indent="0cm" style:auto-text-indent="false"/>
      <style:text-properties fo:color="#bfbfbf" loext:opacity="100%" style:font-name="system-ui" fo:font-size="9.75pt" officeooo:rsid="001dd04e"/>
    </style:style>
    <style:style style:name="P6" style:family="paragraph" style:parent-style-name="Horizontal_20_Line">
      <style:paragraph-properties fo:margin-top="0cm" fo:margin-bottom="0cm" style:contextual-spacing="false" fo:line-height="150%" fo:orphans="1"/>
      <style:text-properties fo:color="#bfbfbf" loext:opacity="100%" style:font-name="system-ui" fo:font-size="9.75pt" officeooo:rsid="001dd04e"/>
    </style:style>
    <style:style style:name="P7" style:family="paragraph" style:parent-style-name="Heading_20_2">
      <style:paragraph-properties fo:margin-left="0cm" fo:margin-right="0cm" fo:margin-top="0cm" fo:margin-bottom="0cm" style:contextual-spacing="false" fo:line-height="150%" fo:orphans="1" fo:text-indent="0cm" style:auto-text-indent="false"/>
      <style:text-properties fo:font-variant="normal" fo:text-transform="none" fo:color="#000000" loext:opacity="100%" style:font-name="system-ui" fo:font-size="10.5pt" fo:letter-spacing="normal" fo:font-style="normal" fo:font-weight="normal" officeooo:rsid="001dd04e" fo:background-color="transparent" loext:padding="0cm" loext:border="none"/>
    </style:style>
    <style:style style:name="P8" style:family="paragraph" style:parent-style-name="Heading_20_3">
      <style:paragraph-properties fo:margin-left="0cm" fo:margin-right="0cm" fo:margin-top="0cm" fo:margin-bottom="0cm" style:contextual-spacing="false" fo:line-height="150%" fo:orphans="1" fo:text-indent="0cm" style:auto-text-indent="false"/>
      <style:text-properties fo:font-variant="normal" fo:text-transform="none" fo:color="#000000" loext:opacity="100%" style:font-name="system-ui" fo:font-size="10.5pt" fo:letter-spacing="normal" fo:font-style="normal" fo:font-weight="normal" officeooo:rsid="001dd04e" fo:background-color="transparent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50%" fo:orphans="1" fo:text-indent="0cm" style:auto-text-indent="false"/>
      <style:text-properties fo:font-variant="normal" fo:text-transform="none" fo:color="#000000" loext:opacity="100%" style:font-name="system-ui" fo:font-size="10.5pt" fo:letter-spacing="normal" fo:font-style="normal" fo:font-weight="normal" officeooo:rsid="001dd04e" fo:background-color="transparent" loext:padding="0cm" loext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line-height="150%" fo:orphans="1" fo:text-indent="0cm" style:auto-text-indent="false" fo:padding="0cm" fo:border="none"/>
      <style:text-properties fo:font-variant="normal" fo:text-transform="none" fo:color="#000000" loext:opacity="100%" style:font-name="system-ui" fo:font-size="10.5pt" fo:letter-spacing="normal" fo:font-style="normal" fo:font-weight="normal" officeooo:rsid="001dd04e" fo:background-color="transparent" loext:padding="0cm" loext:border="none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line-height="150%" fo:orphans="1" fo:text-indent="0cm" style:auto-text-indent="false" fo:padding="0cm" fo:border="none"/>
      <style:text-properties fo:font-variant="normal" fo:text-transform="none" fo:color="#000000" loext:opacity="100%" style:font-name="system-ui" fo:font-size="10.5pt" fo:letter-spacing="normal" fo:font-style="normal" fo:font-weight="normal" officeooo:rsid="001dd04e" fo:background-color="transparent" loext:padding="0cm" loext:border="none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fo:line-height="140%" fo:orphans="1" fo:text-indent="0cm" style:auto-text-indent="false" fo:padding="0cm" fo:border="none"/>
      <style:text-properties fo:color="#bfbfbf" loext:opacity="100%" style:font-name="system-ui" fo:font-size="9.75pt" officeooo:rsid="001dd04e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line-height="150%" fo:orphans="1" fo:text-indent="0cm" style:auto-text-indent="false" fo:padding="0cm" fo:border="none"/>
      <style:text-properties fo:font-variant="normal" fo:text-transform="none" fo:color="#000000" loext:opacity="100%" style:font-name="system-ui" fo:font-size="10.5pt" fo:letter-spacing="normal" fo:font-style="normal" fo:font-weight="normal" officeooo:rsid="001dd04e" fo:background-color="transparent" loext:padding="0cm" loext:border="none"/>
    </style:style>
    <style:style style:name="P14" style:family="paragraph" style:parent-style-name="Text_20_body" style:list-style-name="L4">
      <style:paragraph-properties fo:margin-left="0cm" fo:margin-right="0cm" fo:margin-top="0cm" fo:margin-bottom="0cm" style:contextual-spacing="false" fo:line-height="150%" fo:orphans="1" fo:text-indent="0cm" style:auto-text-indent="false" fo:padding="0cm" fo:border="none"/>
      <style:text-properties fo:font-variant="normal" fo:text-transform="none" fo:color="#000000" loext:opacity="100%" style:font-name="system-ui" fo:font-size="10.5pt" fo:letter-spacing="normal" fo:font-style="normal" fo:font-weight="normal" officeooo:rsid="001dd04e" fo:background-color="transparent" loext:padding="0cm" loext:border="none"/>
    </style:style>
    <style:style style:name="P15" style:family="paragraph" style:parent-style-name="Table_20_Heading">
      <style:paragraph-properties fo:margin-left="0cm" fo:margin-right="0cm" fo:line-height="142%" fo:text-align="left" style:justify-single-word="false" fo:text-indent="0cm" style:auto-text-indent="false"/>
      <style:text-properties fo:font-size="10.5pt"/>
    </style:style>
    <style:style style:name="P16" style:family="paragraph" style:parent-style-name="Table_20_Contents">
      <style:paragraph-properties fo:margin-left="0cm" fo:margin-right="0cm" fo:line-height="140%" fo:text-align="left" style:justify-single-word="false" fo:text-indent="0cm" style:auto-text-indent="false"/>
    </style:style>
    <style:style style:name="P17" style:family="paragraph" style:parent-style-name="Table_20_Contents">
      <style:paragraph-properties fo:margin-left="0cm" fo:margin-right="0cm" fo:text-align="left" style:justify-single-word="false" fo:text-indent="0cm" style:auto-text-indent="false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50%" fo:orphans="1" fo:widows="2" fo:text-indent="0cm" style:auto-text-indent="false"/>
      <style:text-properties fo:font-variant="normal" fo:text-transform="none" fo:color="#000000" loext:opacity="100%" style:font-name="system-ui" fo:font-size="10.5pt" fo:letter-spacing="normal" fo:font-style="normal" fo:font-weight="normal" officeooo:rsid="001dd04e" fo:background-color="transparent" loext:padding="0cm" loext:border="none"/>
    </style:style>
    <style:style style:name="P19" style:family="paragraph" style:parent-style-name="Horizontal_20_Line">
      <style:paragraph-properties fo:margin-left="0cm" fo:margin-right="0cm" fo:margin-top="0cm" fo:margin-bottom="0cm" style:contextual-spacing="false" fo:line-height="150%" fo:orphans="1" fo:widows="2" fo:text-indent="0cm" style:auto-text-indent="false"/>
      <style:text-properties fo:color="#bfbfbf" loext:opacity="100%" style:font-name="system-ui" fo:font-size="9.75pt" officeooo:rsid="001dd04e"/>
    </style:style>
    <style:style style:name="P20" style:family="paragraph" style:parent-style-name="Heading_20_3">
      <style:paragraph-properties fo:margin-left="0cm" fo:margin-right="0cm" fo:margin-top="0cm" fo:margin-bottom="0cm" style:contextual-spacing="false" fo:line-height="150%" fo:orphans="1" fo:widows="2" fo:text-indent="0cm" style:auto-text-indent="false"/>
      <style:text-properties fo:font-variant="normal" fo:text-transform="none" fo:color="#000000" loext:opacity="100%" style:font-name="system-ui" fo:font-size="10.5pt" fo:letter-spacing="normal" fo:font-style="normal" fo:font-weight="normal" officeooo:rsid="001dd04e" fo:background-color="transparent" loext:padding="0cm" loext:border="none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40%" fo:orphans="1" fo:widows="2" fo:text-indent="0cm" style:auto-text-indent="false"/>
      <style:text-properties fo:color="#bfbfbf" loext:opacity="100%" style:font-name="system-ui" fo:font-size="9.75pt" officeooo:rsid="001dd04e"/>
    </style:style>
    <style:style style:name="P22" style:family="paragraph" style:parent-style-name="Text_20_body" style:list-style-name="L5">
      <style:paragraph-properties fo:margin-left="0cm" fo:margin-right="0cm" fo:margin-top="0cm" fo:margin-bottom="0cm" style:contextual-spacing="false" fo:line-height="150%" fo:orphans="1" fo:widows="2" fo:text-indent="0cm" style:auto-text-indent="false" fo:padding="0cm" fo:border="none"/>
      <style:text-properties fo:font-variant="normal" fo:text-transform="none" fo:color="#000000" loext:opacity="100%" style:font-name="system-ui" fo:font-size="10.5pt" fo:letter-spacing="normal" fo:font-style="normal" fo:font-weight="normal" officeooo:rsid="001dd04e" fo:background-color="transparent" loext:padding="0cm" loext:border="none"/>
    </style:style>
    <style:style style:name="P23" style:family="paragraph" style:parent-style-name="Text_20_body" style:list-style-name="L6">
      <style:paragraph-properties fo:margin-left="0cm" fo:margin-right="0cm" fo:margin-top="0cm" fo:margin-bottom="0cm" style:contextual-spacing="false" fo:line-height="150%" fo:orphans="1" fo:widows="2" fo:text-indent="0cm" style:auto-text-indent="false" fo:padding="0cm" fo:border="none"/>
      <style:text-properties fo:font-variant="normal" fo:text-transform="none" fo:color="#000000" loext:opacity="100%" style:font-name="system-ui" fo:font-size="10.5pt" fo:letter-spacing="normal" fo:font-style="normal" fo:font-weight="normal" officeooo:rsid="001dd04e" fo:background-color="transparent" loext:padding="0cm" loext:border="none"/>
    </style:style>
    <style:style style:name="P24" style:family="paragraph" style:parent-style-name="Text_20_body" style:list-style-name="L6">
      <style:paragraph-properties fo:margin-left="0cm" fo:margin-right="0cm" fo:margin-top="0cm" fo:margin-bottom="0cm" style:contextual-spacing="false" fo:line-height="140%" fo:orphans="1" fo:widows="2" fo:text-indent="0cm" style:auto-text-indent="false" fo:padding="0cm" fo:border="none"/>
      <style:text-properties fo:color="#bfbfbf" loext:opacity="100%" style:font-name="system-ui" fo:font-size="9.75pt" officeooo:rsid="001dd04e"/>
    </style:style>
    <style:style style:name="P25" style:family="paragraph" style:parent-style-name="Heading_20_2">
      <style:paragraph-properties fo:margin-left="0cm" fo:margin-right="0cm" fo:margin-top="0cm" fo:margin-bottom="0cm" style:contextual-spacing="false" fo:line-height="150%" fo:orphans="1" fo:widows="2" fo:text-indent="0cm" style:auto-text-indent="false"/>
      <style:text-properties fo:font-variant="normal" fo:text-transform="none" fo:color="#000000" loext:opacity="100%" style:font-name="system-ui" fo:font-size="10.5pt" fo:letter-spacing="normal" fo:font-style="normal" fo:font-weight="normal" officeooo:rsid="001dd04e" fo:background-color="transparent" loext:padding="0cm" loext:border="none"/>
    </style:style>
    <style:style style:name="P26" style:family="paragraph" style:parent-style-name="Text_20_body" style:list-style-name="L7">
      <style:paragraph-properties fo:margin-left="0cm" fo:margin-right="0cm" fo:margin-top="0cm" fo:margin-bottom="0cm" style:contextual-spacing="false" fo:line-height="140%" fo:orphans="1" fo:widows="2" fo:text-indent="0cm" style:auto-text-indent="false" fo:padding="0cm" fo:border="none"/>
      <style:text-properties fo:color="#bfbfbf" loext:opacity="100%" style:font-name="system-ui" fo:font-size="9.75pt" officeooo:rsid="001dd04e"/>
    </style:style>
    <style:style style:name="P27" style:family="paragraph" style:parent-style-name="Text_20_body" style:list-style-name="L7">
      <style:paragraph-properties fo:margin-left="0cm" fo:margin-right="0cm" fo:margin-top="0cm" fo:margin-bottom="0cm" style:contextual-spacing="false" fo:line-height="150%" fo:orphans="1" fo:widows="2" fo:text-indent="0cm" style:auto-text-indent="false" fo:padding="0cm" fo:border="none"/>
      <style:text-properties fo:font-variant="normal" fo:text-transform="none" fo:color="#000000" loext:opacity="100%" style:font-name="system-ui" fo:font-size="10.5pt" fo:letter-spacing="normal" fo:font-style="normal" fo:font-weight="normal" officeooo:rsid="001dd04e" fo:background-color="transparent" loext:padding="0cm" loext:border="none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50%" fo:orphans="1" fo:widows="2" fo:text-indent="0cm" style:auto-text-indent="false"/>
      <style:text-properties fo:font-size="2pt" style:font-size-asian="2pt" style:font-size-complex="2pt"/>
    </style:style>
    <style:style style:name="P29" style:family="paragraph" style:parent-style-name="Text_20_body">
      <style:paragraph-properties fo:margin-left="0cm" fo:margin-right="0cm" fo:text-indent="0cm" style:auto-text-indent="false"/>
    </style:style>
    <style:style style:name="P30" style:family="paragraph" style:parent-style-name="Text_20_body">
      <style:paragraph-properties fo:margin-left="0cm" fo:margin-right="0cm" fo:margin-top="0.159cm" fo:margin-bottom="0cm" style:contextual-spacing="false" fo:line-height="150%" fo:orphans="1" fo:widows="2" fo:text-indent="0cm" style:auto-text-indent="false"/>
      <style:text-properties fo:font-variant="normal" fo:text-transform="none" fo:color="#000000" loext:opacity="100%" style:font-name="system-ui" fo:font-size="10.5pt" fo:letter-spacing="normal" fo:font-style="normal" fo:font-weight="normal" officeooo:rsid="001dd04e" fo:background-color="transparent" loext:padding="0cm" loext:border="none"/>
    </style:style>
    <style:style style:name="P3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system-ui" fo:font-size="8.25pt" fo:letter-spacing="normal" fo:font-style="normal" fo:font-weight="normal" fo:background-color="transparent" style:font-name-asian="system-ui" style:font-size-asian="8.25pt" style:font-style-asian="normal" style:font-weight-asian="normal" style:font-name-complex="system-ui" style:font-size-complex="8.25pt" style:font-style-complex="normal" style:font-weight-complex="normal" loext:padding="0cm" loext:border="none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50%" fo:orphans="1" fo:widows="2" fo:text-indent="0cm" style:auto-text-indent="false"/>
      <style:text-properties fo:font-variant="normal" fo:text-transform="none" fo:color="#000000" loext:opacity="100%" style:font-name="system-ui" fo:font-size="8.25pt" fo:letter-spacing="normal" fo:font-style="normal" fo:font-weight="normal" officeooo:rsid="001dd04e" fo:background-color="transparent" style:font-name-asian="system-ui" style:font-size-asian="8.25pt" style:font-style-asian="normal" style:font-weight-asian="normal" style:font-name-complex="system-ui" style:font-size-complex="8.25pt" style:font-style-complex="normal" style:font-weight-complex="normal" loext:padding="0cm" loext:border="none"/>
    </style:style>
    <style:style style:name="P33" style:family="paragraph" style:parent-style-name="Text_20_body" style:list-style-name="L8">
      <style:paragraph-properties fo:margin-left="0cm" fo:margin-right="0cm" fo:margin-top="0cm" fo:margin-bottom="0cm" style:contextual-spacing="false" fo:line-height="150%" fo:orphans="1" fo:widows="2" fo:text-indent="0cm" style:auto-text-indent="false" fo:padding="0cm" fo:border="none"/>
      <style:text-properties fo:font-variant="normal" fo:text-transform="none" fo:color="#000000" loext:opacity="100%" style:font-name="system-ui" fo:font-size="10.5pt" fo:letter-spacing="normal" fo:font-style="normal" fo:font-weight="normal" officeooo:rsid="001dd04e" fo:background-color="transparent" loext:padding="0cm" loext:border="none"/>
    </style:style>
    <style:style style:name="P34" style:family="paragraph" style:parent-style-name="Text_20_body" style:list-style-name="L9">
      <style:paragraph-properties fo:margin-left="0cm" fo:margin-right="0cm" fo:margin-top="0cm" fo:margin-bottom="0cm" style:contextual-spacing="false" fo:line-height="150%" fo:orphans="1" fo:widows="2" fo:text-indent="0cm" style:auto-text-indent="false" fo:padding="0cm" fo:border="none"/>
      <style:text-properties fo:font-variant="normal" fo:text-transform="none" fo:color="#000000" loext:opacity="100%" style:font-name="system-ui" fo:font-size="10.5pt" fo:letter-spacing="normal" fo:font-style="normal" fo:font-weight="normal" officeooo:rsid="001dd04e" fo:background-color="transparent" loext:padding="0cm" loext:border="none"/>
    </style:style>
    <style:style style:name="P35" style:family="paragraph" style:parent-style-name="Text_20_body" style:list-style-name="L9">
      <style:paragraph-properties fo:margin-left="0cm" fo:margin-right="0cm" fo:margin-top="0cm" fo:margin-bottom="0cm" style:contextual-spacing="false" fo:line-height="140%" fo:orphans="1" fo:widows="2" fo:text-indent="0cm" style:auto-text-indent="false" fo:padding="0cm" fo:border="none"/>
      <style:text-properties fo:color="#bfbfbf" loext:opacity="100%" style:font-name="system-ui" fo:font-size="9.75pt" officeooo:rsid="001dd04e"/>
    </style:style>
    <style:style style:name="P36" style:family="paragraph" style:parent-style-name="Text_20_body" style:list-style-name="L10">
      <style:paragraph-properties fo:margin-left="0cm" fo:margin-right="0cm" fo:margin-top="0cm" fo:margin-bottom="0cm" style:contextual-spacing="false" fo:line-height="140%" fo:orphans="1" fo:widows="2" fo:text-indent="0cm" style:auto-text-indent="false" fo:padding="0cm" fo:border="none"/>
      <style:text-properties fo:color="#bfbfbf" loext:opacity="100%" style:font-name="system-ui" fo:font-size="9.75pt" officeooo:rsid="001dd04e"/>
    </style:style>
    <style:style style:name="P37" style:family="paragraph" style:parent-style-name="Text_20_body" style:list-style-name="L10">
      <style:paragraph-properties fo:margin-left="0cm" fo:margin-right="0cm" fo:margin-top="0cm" fo:margin-bottom="0cm" style:contextual-spacing="false" fo:line-height="150%" fo:orphans="1" fo:widows="2" fo:text-indent="0cm" style:auto-text-indent="false" fo:padding="0cm" fo:border="none"/>
      <style:text-properties fo:font-variant="normal" fo:text-transform="none" fo:color="#000000" loext:opacity="100%" style:font-name="system-ui" fo:font-size="10.5pt" fo:letter-spacing="normal" fo:font-style="normal" fo:font-weight="normal" officeooo:rsid="001dd04e" fo:background-color="transparent" loext:padding="0cm" loext:border="none"/>
    </style:style>
    <style:style style:name="P38" style:family="paragraph" style:parent-style-name="Text_20_body">
      <style:paragraph-properties fo:margin-left="0cm" fo:margin-right="0cm" fo:margin-top="0.159cm" fo:margin-bottom="0cm" style:contextual-spacing="false" fo:line-height="140%" fo:orphans="1" fo:widows="2" fo:text-indent="0cm" style:auto-text-indent="false"/>
      <style:text-properties fo:color="#bfbfbf" loext:opacity="100%" style:font-name="system-ui" fo:font-size="9.75pt" officeooo:rsid="001dd04e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fo:color="#bfbfbf" loext:opacity="100%" style:font-name="system-ui" fo:font-size="10.5pt" officeooo:rsid="001dd04e" loext:padding="0cm" loext:border="none"/>
    </style:style>
    <style:style style:name="P40" style:family="paragraph" style:parent-style-name="Text_20_body">
      <style:paragraph-properties fo:margin-left="0cm" fo:margin-right="0cm" fo:margin-top="0cm" fo:margin-bottom="0cm" style:contextual-spacing="false" style:line-height-at-least="0.476cm" fo:text-indent="0cm" style:auto-text-indent="false"/>
      <style:text-properties fo:color="#bfbfbf" loext:opacity="100%" style:font-name="system-ui" fo:font-size="9.75pt" officeooo:rsid="001dd04e" loext:padding="0cm" loext:border="none"/>
    </style:style>
    <style:style style:name="P4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bfbfbf" loext:opacity="100%" style:font-name="system-ui" fo:font-size="9.75pt" fo:letter-spacing="normal" fo:font-style="normal" fo:font-weight="normal" officeooo:rsid="001dd04e" officeooo:paragraph-rsid="001dd04e"/>
    </style:style>
    <style:style style:name="T1" style:family="text">
      <style:text-properties fo:font-variant="normal" fo:text-transform="none" fo:color="#bfbfbf" loext:opacity="100%" style:font-name="system-ui" fo:font-size="9.75pt" fo:letter-spacing="normal" fo:font-style="normal" fo:font-weight="normal"/>
    </style:style>
    <style:style style:name="T2" style:family="text">
      <style:text-properties fo:font-variant="normal" fo:text-transform="none" fo:color="#48a0c7" loext:opacity="100%" style:font-name="system-ui" fo:font-size="9.75pt" fo:letter-spacing="normal" fo:font-style="normal" fo:font-weight="normal"/>
    </style:style>
    <style:style style:name="T3" style:family="text">
      <style:text-properties fo:font-variant="normal" fo:text-transform="none" fo:color="#bfbfbf" loext:opacity="100%" fo:letter-spacing="normal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font-size="10.5pt" fo:background-color="transparent" loext:char-shading-value="0" loext:padding="0cm" loext:border="none"/>
    </style:style>
    <style:style style:name="T6" style:family="text">
      <style:text-properties fo:font-variant="normal" fo:text-transform="none" fo:color="#3685bf" loext:opacity="100%" style:text-line-through-style="none" style:text-line-through-type="none" fo:font-size="10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7" style:family="text">
      <style:text-properties fo:font-variant="normal" fo:text-transform="none" fo:color="#000000" loext:opacity="100%" fo:font-size="10.5pt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fo:color="#3685bf" loext:opacity="100%" fo:font-size="10.5pt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000000" loext:opacity="100%" fo:font-family="'Droid Sans Mono', monospace, monospace" fo:font-size="10.5pt" fo:letter-spacing="normal" fo:font-style="normal" fo:font-weight="normal" fo:background-color="transparent" loext:char-shading-value="0" loext:padding="0cm" loext:border="none"/>
    </style:style>
    <style:style style:name="T10" style:family="text">
      <style:text-properties fo:font-variant="normal" fo:text-transform="none" fo:color="#3685bf" loext:opacity="100%" fo:font-family="'Droid Sans Mono', monospace, monospace" fo:font-size="10.5pt" fo:letter-spacing="normal" fo:font-style="normal" fo:font-weight="normal" fo:background-color="transparent" loext:char-shading-value="0" loext:padding="0cm" loext:border="none"/>
    </style:style>
    <style:style style:name="T11" style:family="text">
      <style:text-properties fo:font-family="'Droid Sans Mono', monospace, monospace" loext:padding="0cm" loext:border="none"/>
    </style:style>
    <style:style style:name="T12" style:family="text">
      <style:text-properties fo:color="#3685bf" loext:opacity="100%" fo:font-family="'Droid Sans Mono', monospace, monospace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Sect1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itte überprüfe online, welche design entscheidungen in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2">https://circuitsim.com</text:span></text:a><text:span text:style-name="T3"> </text:span><text:span text:style-name="T1">für die librespice Anwendung vorteilhaft wären und übernommen werden können?</text:span></text:p>
      <text:p text:style-name="P2"/>
      <text:p text:style-name="P2"/>
      <text:p text:style-name="P3"><text:span text:style-name="T4">Wie kann ich auf den lokalen ki chat unter localhost:1234 umschalten?<text:line-break/><text:line-break/><text:line-break/></text:span><text:span text:style-name="T5">Ausgangslage</text:span></text:p>
      <text:section text:style-name="Sect1" text:name="bubble-34114e739873">
        <text:p text:style-name="P4"><text:a xlink:type="simple" xlink:href="https://www.circuitsim.com/" office:target-frame-name="_blank" xlink:show="new" text:style-name="Internet_20_link" text:visited-style-name="Visited_20_Internet_20_Link"><text:span text:style-name="T6">circuitsim.com</text:span></text:a><text:span text:style-name="T7"> ist ein noch nicht vollständig gestartetes, browserbasiertes SPICE-Tool von ehemaligen Multisim-Live-Entwicklern — als Ersatz für Multisim Live (EOL September 2026). Die Beta ist derzeit nur eingeschränkt zugänglich (Landing Page teils erreichbar, App-URLs lieferten 502). Konkrete Feature-Infos stammen daher vor allem von der Website, dem </text:span><text:a xlink:type="simple" xlink:href="https://circuitsim.sleekplan.app/" office:target-frame-name="_blank" xlink:show="new" text:style-name="Internet_20_link" text:visited-style-name="Visited_20_Internet_20_Link"><text:span text:style-name="T8">Feature-Feedback-Portal</text:span></text:a><text:span text:style-name="T7"> und Entwickler-Posts (u.a. EEVblog-Forum).</text:span></text:p>
        <text:p text:style-name="P4"><text:span text:style-name="T7">Wichtig: Das ist nicht das Java-Desktop-Projekt </text:span><text:a xlink:type="simple" xlink:href="https://github.com/BlazingHotCode/CircuitSim" office:target-frame-name="_blank" xlink:show="new" text:style-name="Internet_20_link" text:visited-style-name="Visited_20_Internet_20_Link"><text:span text:style-name="T8">BlazingHotCode/CircuitSim</text:span></text:a><text:span text:style-name="T7"> — gleicher Name, anderes Produkt.</text:span></text:p>
        <text:p text:style-name="P5"><text:span text:style-name="T7">LibreSpice ist bereits ein browserbasierter LTSpice-ähnlicher Editor (React + ReactFlow, </text:span><text:span text:style-name="Source_20_Text"><text:span text:style-name="T9">eecircuit-engine</text:span></text:span><text:span text:style-name="T7">), mit getrennten Tabs für Schematic, Netlist und Oscilloscope.</text:span></text:p>
        <text:p text:style-name="P6"/>
        <text:h text:style-name="P7" text:outline-level="2">Design-Entscheidungen von CircuitSim.com — und was LibreSpice übernehmen kann</text:h>
        <text:h text:style-name="P8" text:outline-level="3">1. Integrierter Arbeitsbereich statt Tab-Wechsel (hohe Priorität)</text:h>
        <text:p text:style-name="P9">CircuitSim: Schematic Editor, SPICE Editor, Simulation und Charting in einem durchgängigen Workflow — ähnlich Multisim Live, nicht als getrennte „Modi“.</text:p>
        <text:p text:style-name="P5"><text:span text:style-name="T7">LibreSpice heute: Drei Tabs (</text:span><text:span text:style-name="Source_20_Text"><text:span text:style-name="T9">Schematic</text:span></text:span><text:span text:style-name="T7"> | </text:span><text:span text:style-name="Source_20_Text"><text:span text:style-name="T9">Netlist</text:span></text:span><text:span text:style-name="T7"> | </text:span><text:span text:style-name="Source_20_Text"><text:span text:style-name="T9">Oscilloscope</text:span></text:span><text:span text:style-name="T7">); Simulation startet primär über Toolbar/Netlist-Tab; Oszilloskop ist vom Schaltplan getrennt.</text:span></text:p>
        <text:p text:style-name="P9">Empfehlung: Split-View oder unteres Panel:</text:p>
        <text:list text:style-name="L1">
          <text:list-item>
            <text:p text:style-name="P10">links/oben: Schaltplan</text:p>
          </text:list-item>
          <text:list-item>
            <text:p text:style-name="P10">rechts/unten: live synchronisierte Netlist + Simulationsergebnisse</text:p>
          </text:list-item>
        </text:list>
        <text:p text:style-name="P5"><text:span text:style-name="T7">Das Netlist-Tab kann bleiben, sollte aber nicht der einzige Simulations-Einstieg sein. Entwickler betonen explizit, dass die SPICE-Netlist sichtbar und editierbar im Circuit Editor ist — LibreSpice hat dafür schon </text:span><text:span text:style-name="Source_20_Text"><text:span text:style-name="T9">DirectiveModal</text:span></text:span><text:span text:style-name="T7"> und Netlist-Generierung, aber noch keine Live-Kopplung.</text:span></text:p>
        <text:p text:style-name="P6"/>
        <text:h text:style-name="P8" text:outline-level="3">2. Sichtbare, editierbare SPICE-Netlist (hohe Priorität)</text:h>
        <text:p text:style-name="P9">CircuitSim: Netlist ist in Schaltplan- und Custom-Component-Editor offen; behavioral Komponenten, aber volle transistor-level Modelle per SPICE möglich.</text:p>
        <text:p text:style-name="P5"><text:span text:style-name="T7">LibreSpice heute: Netlist wird generiert, SPICE-Directives liegen in einem Modal; der Netlist-Tab ist read-only (</text:span><text:span text:style-name="Source_20_Text"><text:span text:style-name="T9">&lt;pre&gt;</text:span></text:span><text:span text:style-name="T7">).</text:span></text:p>
        <text:p text:style-name="P9">Empfehlung:</text:p>
        <text:list text:style-name="L2">
          <text:list-item>
            <text:p text:style-name="P11">bidirektionale oder zumindest live einseitige Kopplung (Schaltplan → Netlist in Echtzeit)</text:p>
          </text:list-item>
          <text:list-item>
            <text:p text:style-name="P11">optional editierbare Netlist-Zeilen mit Rückmeldung ans Schematic</text:p>
          </text:list-item>
          <text:list-item>
            <text:p text:style-name="P12"><text:span text:style-name="Source_20_Text"><text:span text:style-name="T9">.model</text:span></text:span><text:span text:style-name="T7">- und Subcircuit-Unterstützung für fortgeschrittene Nutzer</text:span></text:p>
          </text:list-item>
        </text:list>
        <text:p text:style-name="P9">Passt gut zur LTSpice-Ausrichtung von LibreSpice und wäre ein klares Differenzierungsmerkmal <text:soft-page-break/>gegenüber rein visuellen Simulatoren.</text:p>
        <text:p text:style-name="P6"/>
        <text:h text:style-name="P8" text:outline-level="3">3. Custom-Component-Editor (mittlere Priorität, hoher Bildungswert)</text:h>
        <text:p text:style-name="P9">CircuitSim: Eigener Editor mit Input/Output-Ports, Verschachtelung, lokaler Bibliothek; Custom Components können öffentlich geteilt werden.</text:p>
        <text:p text:style-name="P5"><text:span text:style-name="T7">LibreSpice heute: Feste Komponentenbibliothek in </text:span><text:span text:style-name="Source_20_Text"><text:span text:style-name="T10">componentDefinitions.ts</text:span></text:span><text:span text:style-name="T7">, kein Subcircuit-/Hierarchical-Design.</text:span></text:p>
        <text:p text:style-name="P9">Empfehlung: Für Lehre und Hobbyisten sehr wertvoll:</text:p>
        <text:list text:style-name="L3">
          <text:list-item>
            <text:p text:style-name="P13">Subcircuits aus Teilschaltungen</text:p>
          </text:list-item>
          <text:list-item>
            <text:p text:style-name="P13">Port-Definition (IN/OUT/GND)</text:p>
          </text:list-item>
          <text:list-item>
            <text:p text:style-name="P13">Speichern in lokaler/Projekt-Bibliothek</text:p>
          </text:list-item>
          <text:list-item>
            <text:p text:style-name="P13">später: geteilte Community-Komponenten</text:p>
          </text:list-item>
        </text:list>
        <text:p text:style-name="P6"/>
        <text:h text:style-name="P8" text:outline-level="3">4. Simulation + Plotting im Kontext (hohe Priorität)</text:h>
        <text:p text:style-name="P9">CircuitSim: Charting direkt an Simulation gekoppelt — typisches Multisim-Live-Muster.</text:p>
        <text:p text:style-name="P5"><text:span text:style-name="T7">LibreSpice heute: Solider </text:span><text:span text:style-name="Source_20_Text"><text:span text:style-name="T9">OscilloscopeView</text:span></text:span><text:span text:style-name="T7"> (Zoom, Pan, Cursor, Probes), aber erst nach Tab-Wechsel und separatem Simulationslauf.</text:span></text:p>
        <text:p text:style-name="P9">Empfehlung:</text:p>
        <text:list text:style-name="L4">
          <text:list-item>
            <text:p text:style-name="P14">Simulations-Panel als andockbares/unteres Panel im Schematic-Tab (Toolbar hat schon Run/Stop)</text:p>
          </text:list-item>
          <text:list-item>
            <text:p text:style-name="P14">Probes per Klick auf Knoten/Komponente im Schaltplan setzen (LTSpice-ähnlich)</text:p>
          </text:list-item>
          <text:list-item>
            <text:p text:style-name="P14">nach Simulation bleibt man im Schaltplan, Plot öffnet sich daneben/unten</text:p>
          </text:list-item>
        </text:list>
        <text:p text:style-name="P5"><text:span text:style-name="Source_20_Text"><text:span text:style-name="T9">SimulationPanel</text:span></text:span><text:span text:style-name="T7"> existiert bereits — es muss nur in den Haupt-Workflow integriert werden.</text:span></text:p>
        <text:p text:style-name="P6"/>
        <text:h text:style-name="P8" text:outline-level="3">5. Zero-Friction / Bildungsfokus (strategisch)</text:h>
        <text:p text:style-name="P9">CircuitSim: Keine Installation, Chromebook-tauglich, moderne UI statt LTSpice-Look; langfristig Gruppen und Classroom-Grading.</text:p>
        <text:p text:style-name="P5"><text:span text:style-name="T7">LibreSpice heute: Browserbasiert ✓, </text:span><text:span text:style-name="Source_20_Text"><text:span text:style-name="T9">.asc</text:span></text:span><text:span text:style-name="T7">-Import/Export ✓, aber kein URL-Sharing, kein Autosave, kein Account/Classroom.</text:span></text:p>
        <text:p text:style-name="P9">Empfehlung (schrittweise):</text:p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header-rows>
            <table:table-row>
              <table:table-cell table:style-name="Tabelle1.A1" office:value-type="string">
                <text:p text:style-name="P15">Feature</text:p>
              </table:table-cell>
              <table:table-cell table:style-name="Tabelle1.A1" office:value-type="string">
                <text:p text:style-name="P15">Nutzen</text:p>
              </table:table-cell>
              <table:table-cell table:style-name="Tabelle1.A1" office:value-type="string">
                <text:p text:style-name="P15">Aufwand</text:p>
              </table:table-cell>
            </table:table-row>
          </table:table-header-rows>
          <table:table-row>
            <table:table-cell table:style-name="Tabelle1.A2" office:value-type="string">
              <text:p text:style-name="P16">Autosave in <text:span text:style-name="Source_20_Text"><text:span text:style-name="T11">localStorage</text:span></text:span>/IndexedDB</text:p>
            </table:table-cell>
            <table:table-cell table:style-name="Tabelle1.A2" office:value-type="string">
              <text:p text:style-name="P17">Datenverlust vermeiden</text:p>
            </table:table-cell>
            <table:table-cell table:style-name="Tabelle1.C2" office:value-type="string">
              <text:p text:style-name="P17">gering</text:p>
            </table:table-cell>
          </table:table-row>
          <table:table-row>
            <table:table-cell table:style-name="Tabelle1.A2" office:value-type="string">
              <text:p text:style-name="P17">Share via URL (Schaltplan serialisiert)</text:p>
            </table:table-cell>
            <table:table-cell table:style-name="Tabelle1.A2" office:value-type="string">
              <text:p text:style-name="P17">Lehre, Zusammenarbeit</text:p>
            </table:table-cell>
            <table:table-cell table:style-name="Tabelle1.C2" office:value-type="string">
              <text:p text:style-name="P17">mittel</text:p>
            </table:table-cell>
          </table:table-row>
          <table:table-row>
            <table:table-cell table:style-name="Tabelle1.A2" office:value-type="string">
              <text:p text:style-name="P17">Beispiel-Schaltungen („Getting Started“)</text:p>
            </table:table-cell>
            <table:table-cell table:style-name="Tabelle1.A2" office:value-type="string">
              <text:p text:style-name="P17">Onboarding</text:p>
            </table:table-cell>
            <table:table-cell table:style-name="Tabelle1.C2" office:value-type="string">
              <text:p text:style-name="P17">mittel</text:p>
            </table:table-cell>
          </table:table-row>
          <table:table-row>
            <table:table-cell table:style-name="Tabelle1.A5" office:value-type="string">
              <text:p text:style-name="P17">Classroom/Gruppen</text:p>
            </table:table-cell>
            <table:table-cell table:style-name="Tabelle1.A5" office:value-type="string">
              <text:p text:style-name="P17">erst später</text:p>
            </table:table-cell>
            <table:table-cell table:style-name="Tabelle1.A1" office:value-type="string">
              <text:p text:style-name="P17">hoch</text:p>
            </table:table-cell>
          </table:table-row>
        </table:table>
        <text:p text:style-name="P18">Besonders URL-Sharing und Beispielbibliothek wären schnelle Wins für den Bildungsmarkt.</text:p>
        <text:p text:style-name="P19"/>
        <text:h text:style-name="P20" text:outline-level="3"><text:soft-page-break/>6. Moderne, konsistente UI (mittlere Priorität)</text:h>
        <text:p text:style-name="P18">CircuitSim: Bewusst moderner als LTSpice; Zielgruppe Studenten/Hobbyisten.</text:p>
        <text:p text:style-name="P21"><text:span text:style-name="T7">LibreSpice heute: Inline-Styles, </text:span><text:span text:style-name="Source_20_Text"><text:span text:style-name="T9">@chakra-ui/react</text:span></text:span><text:span text:style-name="T7"> in </text:span><text:span text:style-name="Source_20_Text"><text:span text:style-name="T10">package.json</text:span></text:span><text:span text:style-name="T7"> aber kaum genutzt; Dark Mode nur im Header, Toolbar/Properties bleiben hell.</text:span></text:p>
        <text:p text:style-name="P18">Empfehlung:</text:p>
        <text:list text:style-name="L5">
          <text:list-item>
            <text:p text:style-name="P22">ein Designsystem (Chakra nutzen oder Tailwind)</text:p>
          </text:list-item>
          <text:list-item>
            <text:p text:style-name="P22">durchgängiger Dark Mode</text:p>
          </text:list-item>
          <text:list-item>
            <text:p text:style-name="P22">klarere visuelle Hierarchie: Toolbar → Canvas → Properties/Simulation</text:p>
          </text:list-item>
          <text:list-item>
            <text:p text:style-name="P22">kontextuelle Hinweise (LibreSpice hat schon „Placing resistor — click canvas“)</text:p>
          </text:list-item>
        </text:list>
        <text:p text:style-name="P18">CircuitSim orientiert sich an Multisim Live — LibreSpice kann LTSpice-Funktionalität mit moderner Web-UX kombinieren.</text:p>
        <text:p text:style-name="P19"/>
        <text:h text:style-name="P20" text:outline-level="3">7. Behavioral vs. vollständige SPICE-Modelle (architektonisch)</text:h>
        <text:p text:style-name="P18">CircuitSim: Einfache behavioral Built-ins, aber volle SPICE-Modelle jederzeit möglich.</text:p>
        <text:p text:style-name="P21"><text:span text:style-name="T7">LibreSpice heute: Solide SPICE-Komponenten (</text:span><text:span text:style-name="Source_20_Text"><text:span text:style-name="T9">Resistor</text:span></text:span><text:span text:style-name="T7">, </text:span><text:span text:style-name="Source_20_Text"><text:span text:style-name="T9">BJT</text:span></text:span><text:span text:style-name="T7">, </text:span><text:span text:style-name="Source_20_Text"><text:span text:style-name="T9">MOSFET</text:span></text:span><text:span text:style-name="T7"> etc.) mit </text:span><text:span text:style-name="Source_20_Text"><text:span text:style-name="T9">NetlistGenerator</text:span></text:span><text:span text:style-name="T7"> — gute Basis.</text:span></text:p>
        <text:p text:style-name="P18">Empfehlung: Zwei Ebenen beibehalten:</text:p>
        <text:list text:style-name="L6">
          <text:list-item>
            <text:p text:style-name="P23">Anfänger: vorgefertigte Komponenten, Properties-Panel</text:p>
          </text:list-item>
          <text:list-item>
            <text:p text:style-name="P24"><text:span text:style-name="T7">Fortgeschrittene: </text:span><text:span text:style-name="Source_20_Text"><text:span text:style-name="T9">.model</text:span></text:span><text:span text:style-name="T7">-Editor, Subcircuits, SPICE-Directives</text:span></text:p>
          </text:list-item>
        </text:list>
        <text:p text:style-name="P21"><text:span text:style-name="T7">Das passt zur bestehenden Architektur (</text:span><text:span text:style-name="Source_20_Text"><text:span text:style-name="T9">SpiceComponent</text:span></text:span><text:span text:style-name="T7">, </text:span><text:span text:style-name="Source_20_Text"><text:span text:style-name="T9">getProperties()</text:span></text:span><text:span text:style-name="T7">, </text:span><text:span text:style-name="Source_20_Text"><text:span text:style-name="T9">spiceDirectives</text:span></text:span><text:span text:style-name="T7">).</text:span></text:p>
        <text:p text:style-name="P19"/>
        <text:h text:style-name="P25" text:outline-level="2">Was LibreSpice bereits gut macht (beibehalten)</text:h>
        <text:list text:style-name="L7">
          <text:list-item>
            <text:p text:style-name="P26"><text:span text:style-name="T7">LTSpice-</text:span><text:span text:style-name="Source_20_Text"><text:span text:style-name="T9">.asc</text:span></text:span><text:span text:style-name="T7">-Kompatibilität — CircuitSim hat das nicht; das ist ein LibreSpice-Vorteil</text:span></text:p>
          </text:list-item>
          <text:list-item>
            <text:p text:style-name="P27">Solider Editor: Grid-Snap, Undo/Redo, Tastenkürzel (R/C/L/W…), Drag-and-Drop-Palette</text:p>
          </text:list-item>
          <text:list-item>
            <text:p text:style-name="P26"><text:span text:style-name="T7">SPICE-Analysen: </text:span><text:span text:style-name="Source_20_Text"><text:span text:style-name="T9">.tran</text:span></text:span><text:span text:style-name="T7">, </text:span><text:span text:style-name="Source_20_Text"><text:span text:style-name="T9">.dc</text:span></text:span><text:span text:style-name="T7">, </text:span><text:span text:style-name="Source_20_Text"><text:span text:style-name="T9">.ac</text:span></text:span><text:span text:style-name="T7">, </text:span><text:span text:style-name="Source_20_Text"><text:span text:style-name="T9">.op</text:span></text:span><text:span text:style-name="T7"> in </text:span><text:span text:style-name="Source_20_Text"><text:span text:style-name="T9">SimulationPanel</text:span></text:span></text:p>
          </text:list-item>
          <text:list-item>
            <text:p text:style-name="P27">Oszilloskop mit Cursor und Zoom — technisch schon auf CircuitSim-Niveau</text:p>
          </text:list-item>
        </text:list>
        <text:p text:style-name="P19"/>
        <text:h text:style-name="P25" text:outline-level="2">Priorisierte Roadmap für LibreSpice</text:h>
        <text:p text:style-name="P28"><draw:frame draw:style-name="fr1" draw:name="Rahmen1" text:anchor-type="char" svg:x="0cm" svg:width="17.171cm" draw:z-index="0"><draw:text-box fo:min-height="0.159cm"><text:p text:style-name="P29"/></draw:text-box></draw:frame></text:p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header-rows>
            <table:table-row>
              <table:table-cell table:style-name="Tabelle2.A1" office:value-type="string">
                <text:p text:style-name="P15">Priorität</text:p>
              </table:table-cell>
              <table:table-cell table:style-name="Tabelle2.A1" office:value-type="string">
                <text:p text:style-name="P15">Design-Entscheidung von CircuitSim</text:p>
              </table:table-cell>
              <table:table-cell table:style-name="Tabelle2.A1" office:value-type="string">
                <text:p text:style-name="P15">LibreSpice-Aktion</text:p>
              </table:table-cell>
            </table:table-row>
          </table:table-header-rows>
          <table:table-row>
            <table:table-cell table:style-name="Tabelle2.A2" office:value-type="string">
              <text:p text:style-name="P17">1</text:p>
            </table:table-cell>
            <table:table-cell table:style-name="Tabelle2.A2" office:value-type="string">
              <text:p text:style-name="P17">Integrierter Workflow</text:p>
            </table:table-cell>
            <table:table-cell table:style-name="Tabelle2.C2" office:value-type="string">
              <text:p text:style-name="P17">Simulation + Plot ins Schematic-Tab andocken</text:p>
            </table:table-cell>
          </table:table-row>
          <table:table-row>
            <table:table-cell table:style-name="Tabelle2.A2" office:value-type="string">
              <text:p text:style-name="P17">2</text:p>
            </table:table-cell>
            <table:table-cell table:style-name="Tabelle2.A2" office:value-type="string">
              <text:p text:style-name="P17">Sichtbare SPICE-Netlist</text:p>
            </table:table-cell>
            <table:table-cell table:style-name="Tabelle2.C2" office:value-type="string">
              <text:p text:style-name="P17">Live-Netlist-Panel statt reinem Tab</text:p>
            </table:table-cell>
          </table:table-row>
          <table:table-row>
            <table:table-cell table:style-name="Tabelle2.A2" office:value-type="string">
              <text:p text:style-name="P17">3</text:p>
            </table:table-cell>
            <table:table-cell table:style-name="Tabelle2.A2" office:value-type="string">
              <text:p text:style-name="P17">Probing im Kontext</text:p>
            </table:table-cell>
            <table:table-cell table:style-name="Tabelle2.C2" office:value-type="string">
              <text:p text:style-name="P17">Knoten/Komponenten-Klick → Oszilloskop-Trace</text:p>
            </table:table-cell>
          </table:table-row>
          <table:table-row>
            <table:table-cell table:style-name="Tabelle2.A2" office:value-type="string">
              <text:p text:style-name="P17">4</text:p>
            </table:table-cell>
            <table:table-cell table:style-name="Tabelle2.A2" office:value-type="string">
              <text:p text:style-name="P17">Zero-Friction</text:p>
            </table:table-cell>
            <table:table-cell table:style-name="Tabelle2.C2" office:value-type="string">
              <text:p text:style-name="P17">Autosave + URL-Export</text:p>
            </table:table-cell>
          </table:table-row>
          <table:table-row>
            <table:table-cell table:style-name="Tabelle2.A2" office:value-type="string">
              <text:p text:style-name="P17">5</text:p>
            </table:table-cell>
            <table:table-cell table:style-name="Tabelle2.A2" office:value-type="string">
              <text:p text:style-name="P17">Custom Components</text:p>
            </table:table-cell>
            <table:table-cell table:style-name="Tabelle2.C2" office:value-type="string">
              <text:p text:style-name="P17">Subcircuit-Editor</text:p>
            </table:table-cell>
          </table:table-row>
          <table:table-row>
            <table:table-cell table:style-name="Tabelle2.A2" office:value-type="string">
              <text:p text:style-name="P17">6</text:p>
            </table:table-cell>
            <table:table-cell table:style-name="Tabelle2.A2" office:value-type="string">
              <text:p text:style-name="P17">Moderne UI</text:p>
            </table:table-cell>
            <table:table-cell table:style-name="Tabelle2.C2" office:value-type="string">
              <text:p text:style-name="P17">Designsystem, konsistenter Dark Mode</text:p>
            </table:table-cell>
          </table:table-row>
          <table:table-row>
            <table:table-cell table:style-name="Tabelle2.A8" office:value-type="string">
              <text:p text:style-name="P17">7</text:p>
            </table:table-cell>
            <table:table-cell table:style-name="Tabelle2.A8" office:value-type="string">
              <text:p text:style-name="P17">Bildung</text:p>
            </table:table-cell>
            <table:table-cell table:style-name="Tabelle2.A1" office:value-type="string">
              <text:p text:style-name="P17">Beispielschaltungen, später Classroom</text:p>
            </table:table-cell>
          </table:table-row>
        </table:table>
        <text:p text:style-name="P19"/>
        <text:h text:style-name="P25" text:outline-level="2">Fazit</text:h>
        <text:p text:style-name="P18">Von circuitsim.com lassen sich vor allem Workflow- und UX-Entscheidungen übernehmen, weniger der <text:soft-page-break/>konkrete Tech-Stack: ein integrierter Editor-Simulator-Plotter, transparente SPICE-Netlist, Custom Components und bildungsfreundliches Onboarding. LibreSpice hat technisch schon solide Grundlagen (LTSpice-Import, SPICE-Engine, Oszilloskop) — der größte Hebel liegt in der Zusammenführung der drei Tabs zu einem Multisim-Live-ähnlichen Arbeitsbereich.</text:p>
        <text:p text:style-name="P30">Soll ich mit einer konkreten Umsetzung starten — z.B. Simulation-Panel im Schematic-Tab andocken oder ein live synchronisiertes Netlist-Panel?</text:p>
      </text:section>
      <text:section text:style-name="Sect1" text:name="bubble-a7fbd227ca7e">
        <text:p text:style-name="P31"/>
      </text:section>
      <text:section text:style-name="Sect1" text:name="bubble-8e3251a9ba84">
        <text:p text:style-name="P32">Die Punkte 1–4 sind umgesetzt. Kurzüberblick:</text:p>
        <text:h text:style-name="P25" text:outline-level="2">1. Integrierter Workflow (Simulation + Plot im Schematic-Tab)</text:h>
        <text:p text:style-name="P21"><text:span text:style-name="T7">Unter dem Schaltplan gibt es ein andockbares Bottom-Panel (</text:span><text:span text:style-name="Source_20_Text"><text:span text:style-name="T10">DockPanel.tsx</text:span></text:span><text:span text:style-name="T7">) mit drei Tabs:</text:span></text:p>
        <text:list text:style-name="L8">
          <text:list-item>
            <text:p text:style-name="P33">Netlist – live synchronisierte SPICE-Netlist</text:p>
          </text:list-item>
          <text:list-item>
            <text:p text:style-name="P33">Simulation – Analyse-Einstellungen und Run-Button</text:p>
          </text:list-item>
          <text:list-item>
            <text:p text:style-name="P33">Waveform – kompaktes Oszilloskop</text:p>
          </text:list-item>
        </text:list>
        <text:p text:style-name="P18">Das Panel ist per Drag-Handle in der Höhe verstellbar und ein-/ausklappbar. Nach einer Simulation wechselt die Ansicht automatisch zum Tab Waveform.</text:p>
        <text:h text:style-name="P25" text:outline-level="2">2. Live SPICE-Netlist</text:h>
        <text:p text:style-name="P21"><text:span text:style-name="Source_20_Text"><text:span text:style-name="T10">LiveNetlistPanel.tsx</text:span></text:span><text:span text:style-name="T7"> zeigt die Netlist live beim Bearbeiten des Schaltplans. Zusätzlich kann man Custom SPICE Directives direkt im Panel editieren (</text:span><text:span text:style-name="Source_20_Text"><text:span text:style-name="T9">.model</text:span></text:span><text:span text:style-name="T7">, </text:span><text:span text:style-name="Source_20_Text"><text:span text:style-name="T9">.save</text:span></text:span><text:span text:style-name="T7">, …). Der Netlist-Tab nutzt dieselbe Komponente.</text:span></text:p>
        <text:h text:style-name="P25" text:outline-level="2">3. Probing im Kontext</text:h>
        <text:list text:style-name="L9">
          <text:list-item>
            <text:p text:style-name="P34">Doppelklick auf eine Komponente → Probes hinzufügen, Wechsel zum Waveform-Tab</text:p>
          </text:list-item>
          <text:list-item>
            <text:p text:style-name="P34">Properties-Panel → Buttons „Add all probes“, „Probe voltage“, „Probe current“</text:p>
          </text:list-item>
          <text:list-item>
            <text:p text:style-name="P34">Visueller Indikator (cyaner Punkt) an komponenten mit aktiven Probes</text:p>
          </text:list-item>
          <text:list-item>
            <text:p text:style-name="P35"><text:span text:style-name="Source_20_Text"><text:span text:style-name="T10">probeUtils.ts</text:span></text:span><text:span text:style-name="T7"> mappt Komponenten auf SPICE-Variablen (</text:span><text:span text:style-name="Source_20_Text"><text:span text:style-name="T9">V(net)</text:span></text:span><text:span text:style-name="T7">, </text:span><text:span text:style-name="Source_20_Text"><text:span text:style-name="T9">I(R1)</text:span></text:span><text:span text:style-name="T7">) mit Fuzzy-Matching zu Simulationsergebnissen</text:span></text:p>
          </text:list-item>
        </text:list>
        <text:h text:style-name="P25" text:outline-level="2">4. Autosave + URL-Share</text:h>
        <text:list text:style-name="L10">
          <text:list-item>
            <text:p text:style-name="P36"><text:span text:style-name="T7">Autosave in </text:span><text:span text:style-name="Source_20_Text"><text:span text:style-name="T9">localStorage</text:span></text:span><text:span text:style-name="T7"> (debounced, 1 s) via </text:span><text:span text:style-name="Source_20_Text"><text:span text:style-name="T10">useAutosave.ts</text:span></text:span></text:p>
          </text:list-item>
          <text:list-item>
            <text:p text:style-name="P36"><text:span text:style-name="T7">Beim Start: zuerst URL-Hash (</text:span><text:span text:style-name="Source_20_Text"><text:span text:style-name="T9">#c=…</text:span></text:span><text:span text:style-name="T7">), sonst Autosave laden</text:span></text:p>
          </text:list-item>
          <text:list-item>
            <text:p text:style-name="P37">Share-Button in der Toolbar kopiert einen Link mit eingebettetem Schaltplan in die Zwischenablage</text:p>
          </text:list-item>
          <text:list-item>
            <text:p text:style-name="P36"><text:span text:style-name="Source_20_Text"><text:span text:style-name="T9">exportSnapshot()</text:span></text:span><text:span text:style-name="T7"> / </text:span><text:span text:style-name="Source_20_Text"><text:span text:style-name="T9">loadFromSnapshot()</text:span></text:span><text:span text:style-name="T7"> in </text:span><text:span text:style-name="Source_20_Text"><text:span text:style-name="T9">circuitStore</text:span></text:span><text:span text:style-name="T7"> für Serialisierung</text:span></text:p>
          </text:list-item>
        </text:list>
        <text:h text:style-name="P20" text:outline-level="3">Neue/geänderte Dateien</text:h>
        <table:table table:name="Tabelle3" table:style-name="Tabelle3">
          <table:table-column table:style-name="Tabelle3.A"/>
          <table:table-column table:style-name="Tabelle3.B"/>
          <table:table-header-rows>
            <table:table-row>
              <table:table-cell table:style-name="Tabelle3.A1" office:value-type="string">
                <text:p text:style-name="P15">Datei</text:p>
              </table:table-cell>
              <table:table-cell table:style-name="Tabelle3.A1" office:value-type="string">
                <text:p text:style-name="P15">Zweck</text:p>
              </table:table-cell>
            </table:table-row>
          </table:table-header-rows>
          <table:table-row>
            <table:table-cell table:style-name="Tabelle3.A2" office:value-type="string">
              <text:p text:style-name="P16"><text:span text:style-name="Source_20_Text"><text:span text:style-name="T12">src/editor/DockPanel.tsx</text:span></text:span></text:p>
            </table:table-cell>
            <table:table-cell table:style-name="Tabelle3.B2" office:value-type="string">
              <text:p text:style-name="P17">Bottom-Panel mit Tabs</text:p>
            </table:table-cell>
          </table:table-row>
          <table:table-row>
            <table:table-cell table:style-name="Tabelle3.A2" office:value-type="string">
              <text:p text:style-name="P16"><text:span text:style-name="Source_20_Text"><text:span text:style-name="T12">src/editor/LiveNetlistPanel.tsx</text:span></text:span></text:p>
            </table:table-cell>
            <table:table-cell table:style-name="Tabelle3.B2" office:value-type="string">
              <text:p text:style-name="P17">Live-Netlist + Directives</text:p>
            </table:table-cell>
          </table:table-row>
          <table:table-row>
            <table:table-cell table:style-name="Tabelle3.A2" office:value-type="string">
              <text:p text:style-name="P16"><text:span text:style-name="Source_20_Text"><text:span text:style-name="T12">src/simulation/OscilloscopePlot.tsx</text:span></text:span></text:p>
            </table:table-cell>
            <table:table-cell table:style-name="Tabelle3.B2" office:value-type="string">
              <text:p text:style-name="P17">Wiederverwendbares Plot-Widget</text:p>
            </table:table-cell>
          </table:table-row>
          <text:soft-page-break/>
          <table:table-row>
            <table:table-cell table:style-name="Tabelle3.A2" office:value-type="string">
              <text:p text:style-name="P16"><text:span text:style-name="Source_20_Text"><text:span text:style-name="T12">src/editor/componentFactory.ts</text:span></text:span></text:p>
            </table:table-cell>
            <table:table-cell table:style-name="Tabelle3.B2" office:value-type="string">
              <text:p text:style-name="P17">Ausgelagerte Komponenten-Fabrik</text:p>
            </table:table-cell>
          </table:table-row>
          <table:table-row>
            <table:table-cell table:style-name="Tabelle3.A2" office:value-type="string">
              <text:p text:style-name="P16"><text:span text:style-name="Source_20_Text"><text:span text:style-name="T12">src/core/circuit/probeUtils.ts</text:span></text:span></text:p>
            </table:table-cell>
            <table:table-cell table:style-name="Tabelle3.B2" office:value-type="string">
              <text:p text:style-name="P17">Probe-Variable-Mapping</text:p>
            </table:table-cell>
          </table:table-row>
          <table:table-row>
            <table:table-cell table:style-name="Tabelle3.A2" office:value-type="string">
              <text:p text:style-name="P16"><text:span text:style-name="Source_20_Text"><text:span text:style-name="T12">src/store/persistence.ts</text:span></text:span></text:p>
            </table:table-cell>
            <table:table-cell table:style-name="Tabelle3.B2" office:value-type="string">
              <text:p text:style-name="P17">Serialisierung, URL, localStorage</text:p>
            </table:table-cell>
          </table:table-row>
          <table:table-row>
            <table:table-cell table:style-name="Tabelle3.A8" office:value-type="string">
              <text:p text:style-name="P16"><text:span text:style-name="Source_20_Text"><text:span text:style-name="T12">src/store/useAutosave.ts</text:span></text:span></text:p>
            </table:table-cell>
            <table:table-cell table:style-name="Tabelle3.A1" office:value-type="string">
              <text:p text:style-name="P17">Autosave-Hook</text:p>
            </table:table-cell>
          </table:table-row>
        </table:table>
        <text:p text:style-name="P38"><text:span text:style-name="T7">Build und TypeScript-Check laufen fehlerfrei durch. Zum Testen: </text:span><text:span text:style-name="Source_20_Text"><text:span text:style-name="T9">npm run dev</text:span></text:span><text:span text:style-name="T7"> starten, Komponenten platzieren, Simulation starten (F5 oder ▶), dann Doppelklick auf eine Komponente für Probes.</text:span></text:p>
      </text:section>
      <text:p text:style-name="P39">Kannst du die Punkte 5.-6. noch ergänzen und testen, ob die App noch korrekt startet?</text:p>
      <text:p text:style-name="P40">Composer 2.5 Fast</text:p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6T17:16:18.936731352</meta:creation-date>
    <meta:editing-duration>PT1H51M15S</meta:editing-duration>
    <meta:editing-cycles>2</meta:editing-cycles>
    <meta:generator>LibreOffice/26.2.4.2$Linux_X86_64 LibreOffice_project/620$Build-2</meta:generator>
    <dc:date>2026-06-16T19:17:42.696936659</dc:date>
    <meta:document-statistic meta:table-count="3" meta:image-count="0" meta:object-count="0" meta:page-count="5" meta:paragraph-count="145" meta:word-count="1023" meta:character-count="8811" meta:non-whitespace-character-count="7948"/>
  </office:meta>
</office:document-meta>
</file>